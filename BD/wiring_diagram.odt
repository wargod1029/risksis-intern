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20255F6D7133D70FC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background-color="#800080"/>
    </style:style>
    <style:style style:name="P4" style:family="paragraph">
      <style:text-properties fo:background-color="#ffff00"/>
    </style:style>
    <style:style style:name="P5" style:family="paragraph">
      <loext:graphic-properties draw:fill="none" draw:fill-color="#ffffff"/>
      <style:text-properties fo:background-color="#ffff00"/>
    </style:style>
    <style:style style:name="P6" style:family="paragraph">
      <style:text-properties fo:background-color="#ff0000"/>
    </style:style>
    <style:style style:name="P7" style:family="paragraph">
      <loext:graphic-properties draw:fill="none" draw:fill-color="#ffffff"/>
      <style:text-properties fo:background-color="#ff0000"/>
    </style:style>
    <style:style style:name="T1" style:family="text">
      <style:text-properties fo:background-color="#800080"/>
    </style:style>
    <style:style style:name="T2" style:family="text">
      <style:text-properties fo:background-color="#ffff00"/>
    </style:style>
    <style:style style:name="T3" style:family="text">
      <style:text-properties fo:background-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01cm" svg:stroke-color="#000000" draw:fill="none" draw:fill-color="#ffffff" fo:min-height="0.6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0.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101cm" svg:stroke-color="#ff4000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101cm" svg:stroke-color="#000000" draw:fill="none" draw:fill-color="#ffffff" fo:min-height="1.2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101cm" svg:stroke-color="#000000" draw:fill="none" draw:fill-color="#ffffff" fo:min-height="0.7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101cm" svg:stroke-color="#ff4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.101cm" svg:stroke-color="#000000" draw:fill="none" draw:fill-color="#ffffff" fo:min-height="0.5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width="0.101cm" svg:stroke-color="#800080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.101cm" svg:stroke-color="#000000" draw:fill="none" draw:fill-color="#ffffff" fo:min-height="0.5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svg:stroke-width="0.101cm" svg:stroke-color="#ffff00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101cm" svg:stroke-color="#ffff6d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101cm" svg:stroke-color="#ffff6d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width="0.101cm" svg:stroke-color="#000000" draw:fill="none" draw:fill-color="#ffffff" fo:min-height="0.6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solid" svg:stroke-width="0cm" svg:stroke-color="#ff4000" draw:marker-start-width="0.203cm" draw:marker-end-width="0.20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1.0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path text:anchor-type="paragraph" draw:z-index="1" draw:name="Bézier curve 1" draw:style-name="gr16" draw:text-style-name="P2" svg:width="0.707cm" svg:height="1.194cm" draw:transform="rotate (2.78432375570655) translate (12.9994793362431cm 1.21143789913993cm)" svg:viewBox="0 0 708 1195" svg:d="M0 1191c182 25 337-75 498-133 223-80 241-368 179-560l-67-224-74-199 8-75"><text:p/></draw:path><draw:path text:anchor-type="paragraph" draw:z-index="2" draw:name="Bézier curve 2" draw:style-name="gr16" draw:text-style-name="P2" svg:width="0.512cm" svg:height="0.485cm" draw:transform="rotate (-0.982794901798007) translate (12.6134343557092cm 0.536900931743062cm)" svg:viewBox="0 0 513 486" svg:d="M0 485c160-27 783 107 380-302l-97-183"><text:p/></draw:path><draw:frame text:anchor-type="paragraph" draw:z-index="3" draw:name="Text Frame 1" draw:style-name="gr15" draw:text-style-name="P1" svg:width="2.564cm" svg:height="1.038cm" svg:x="13.647cm" svg:y="-0.198cm"><draw:text-box><text:p>RJ45, ethernet cable</text:p></draw:text-box></draw:frame><draw:line text:anchor-type="paragraph" draw:z-index="4" draw:name="Line 1" draw:style-name="gr6" draw:text-style-name="P2" svg:x1="8.322cm" svg:y1="0.773cm" svg:x2="8.29cm" svg:y2="4.363cm"><text:p/></draw:line><draw:line text:anchor-type="paragraph" draw:z-index="5" draw:name="Line 2" draw:style-name="gr6" draw:text-style-name="P2" svg:x1="8.29cm" svg:y1="4.362cm" svg:x2="11.745cm" svg:y2="5.27cm"><text:p/></draw:line><draw:line text:anchor-type="paragraph" draw:z-index="6" draw:name="Line 3" draw:style-name="gr6" draw:text-style-name="P2" svg:x1="11.995cm" svg:y1="6.446cm" svg:x2="11.746cm" svg:y2="5.271cm"><text:p/></draw:line><draw:line text:anchor-type="paragraph" draw:z-index="7" draw:name="Line 4" draw:style-name="gr14" draw:text-style-name="P2" svg:x1="14.936cm" svg:y1="6.362cm" svg:x2="11.994cm" svg:y2="6.445cm"><text:p/></draw:line><draw:line text:anchor-type="paragraph" draw:z-index="8" draw:name="Line 5" draw:style-name="gr3" draw:text-style-name="P2" svg:x1="8.322cm" svg:y1="1.716cm" svg:x2="9.761cm" svg:y2="1.799cm"><text:p/></draw:line><draw:line text:anchor-type="paragraph" draw:z-index="9" draw:name="Line 6" draw:style-name="gr3" draw:text-style-name="P2" svg:x1="8.29cm" svg:y1="2.526cm" svg:x2="9.96cm" svg:y2="2.477cm"><text:p/></draw:line><draw:line text:anchor-type="paragraph" draw:z-index="10" draw:name="Line 7" draw:style-name="gr3" draw:text-style-name="P2" svg:x1="8.322cm" svg:y1="3.336cm" svg:x2="9.894cm" svg:y2="3.221cm"><text:p/></draw:line><draw:line text:anchor-type="paragraph" draw:z-index="11" draw:name="Line 8" draw:style-name="gr3" draw:text-style-name="P2" svg:x1="8.29cm" svg:y1="3.981cm" svg:x2="9.927cm" svg:y2="3.815cm"><text:p/></draw:line><draw:line text:anchor-type="paragraph" draw:z-index="12" draw:name="Line 9" draw:style-name="gr3" draw:text-style-name="P2" svg:x1="11.994cm" svg:y1="6.362cm" svg:x2="12.506cm" svg:y2="5.535cm"><text:p/></draw:line><draw:line text:anchor-type="paragraph" draw:z-index="13" draw:name="Line 10" draw:style-name="gr3" draw:text-style-name="P2" svg:x1="12.589cm" svg:y1="6.446cm" svg:x2="13.085cm" svg:y2="5.486cm"><text:p/></draw:line><draw:line text:anchor-type="paragraph" draw:z-index="14" draw:name="Line 11" draw:style-name="gr3" draw:text-style-name="P2" svg:x1="13.333cm" svg:y1="6.363cm" svg:x2="13.763cm" svg:y2="5.553cm"><text:p/></draw:line><draw:line text:anchor-type="paragraph" draw:z-index="15" draw:name="Line 12" draw:style-name="gr3" draw:text-style-name="P2" svg:x1="14.392cm" svg:y1="6.445cm" svg:x2="14.641cm" svg:y2="5.602cm"><text:p/></draw:line><draw:frame text:anchor-type="paragraph" draw:z-index="16" draw:name="Text Frame 2" draw:style-name="gr13" draw:text-style-name="P7" svg:width="3.754cm" svg:height="1.075cm" svg:x="6.851cm" svg:y="-0.198cm"><draw:text-box><text:p text:style-name="P6"><text:span text:style-name="T3">8 ethernet wire from lidar</text:span></text:p></draw:text-box></draw:frame><draw:line text:anchor-type="paragraph" draw:z-index="17" draw:name="Line 13" draw:style-name="gr12" draw:text-style-name="P2" svg:x1="8.141cm" svg:y1="1.12cm" svg:x2="2.849cm" svg:y2="1.169cm"><text:p text:style-name="P2">e</text:p></draw:line><draw:line text:anchor-type="paragraph" draw:z-index="18" draw:name="Line 14" draw:style-name="gr11" draw:text-style-name="P2" svg:x1="2.832cm" svg:y1="1.302cm" svg:x2="2.716cm" svg:y2="4.262cm"><text:p/></draw:line><draw:line text:anchor-type="paragraph" draw:z-index="19" draw:name="Line 15" draw:style-name="gr10" draw:text-style-name="P2" svg:x1="2.634cm" svg:y1="4.246cm" svg:x2="1.907cm" svg:y2="4.246cm"><text:p/></draw:line><draw:line text:anchor-type="paragraph" draw:z-index="20" draw:name="Line 16" draw:style-name="gr10" draw:text-style-name="P2" svg:x1="1.94cm" svg:y1="4.411cm" svg:x2="1.873cm" svg:y2="10.281cm"><text:p/></draw:line><draw:line text:anchor-type="paragraph" draw:z-index="21" draw:name="Line 17" draw:style-name="gr10" draw:text-style-name="P2" svg:x1="2.023cm" svg:y1="10.349cm" svg:x2="6.272cm" svg:y2="10.365cm"><text:p/></draw:line><draw:line text:anchor-type="paragraph" draw:z-index="22" draw:name="Vertical line 1" draw:style-name="gr10" draw:text-style-name="P2" svg:x1="4.288cm" svg:y1="10.215cm" svg:x2="4.288cm" svg:y2="9.273cm"><text:p/></draw:line><draw:line text:anchor-type="paragraph" draw:z-index="23" draw:name="Line 18" draw:style-name="gr8" draw:text-style-name="P2" svg:x1="4.882cm" svg:y1="10.133cm" svg:x2="4.965cm" svg:y2="9.223cm"><text:p/></draw:line><draw:frame text:anchor-type="paragraph" draw:z-index="24" draw:name="Text Frame 3" draw:style-name="gr9" draw:text-style-name="P5" svg:width="2.035cm" svg:height="1.075cm" svg:x="4.189cm" svg:y="-0.071cm"><draw:text-box><text:p text:style-name="P4"><text:span text:style-name="T2">2 wire from lidar</text:span></text:p></draw:text-box></draw:frame><draw:line text:anchor-type="paragraph" draw:z-index="25" draw:name="Line 19" draw:style-name="gr8" draw:text-style-name="P2" svg:x1="3.627cm" svg:y1="0.161cm" svg:x2="3.544cm" svg:y2="1.616cm"><text:p/></draw:line><draw:frame text:anchor-type="paragraph" draw:z-index="26" draw:name="Text Frame 4" draw:style-name="gr7" draw:text-style-name="P3" svg:width="1.62cm" svg:height="1.075cm" svg:x="1.808cm" svg:y="-0.198cm"><draw:text-box><text:p><text:span text:style-name="T1">Power wire</text:span></text:p></draw:text-box></draw:frame><draw:line text:anchor-type="paragraph" draw:z-index="27" draw:name="Line 20" draw:style-name="gr6" draw:text-style-name="P2" svg:x1="6.438cm" svg:y1="11.059cm" svg:x2="15.102cm" svg:y2="10.927cm"><text:p/></draw:line><draw:line text:anchor-type="paragraph" draw:z-index="28" draw:name="Line 21" draw:style-name="gr3" draw:text-style-name="P2" svg:x1="6.851cm" svg:y1="10.844cm" svg:x2="6.768cm" svg:y2="9.389cm"><text:p/></draw:line><draw:line text:anchor-type="paragraph" draw:z-index="29" draw:name="Line 22" draw:style-name="gr3" draw:text-style-name="P2" svg:x1="7.579cm" svg:y1="10.927cm" svg:x2="7.743cm" svg:y2="9.405cm"><text:p/></draw:line><draw:line text:anchor-type="paragraph" draw:z-index="30" draw:name="Vertical line 2" draw:style-name="gr3" draw:text-style-name="P2" svg:x1="8.786cm" svg:y1="10.811cm" svg:x2="8.786cm" svg:y2="9.34cm"><text:p/></draw:line><draw:line text:anchor-type="paragraph" draw:z-index="31" draw:name="Line 23" draw:style-name="gr3" draw:text-style-name="P2" svg:x1="9.795cm" svg:y1="10.695cm" svg:x2="10.093cm" svg:y2="9.421cm"><text:p/></draw:line><draw:line text:anchor-type="paragraph" draw:z-index="32" draw:name="Line 24" draw:style-name="gr3" draw:text-style-name="P2" svg:x1="10.836cm" svg:y1="10.728cm" svg:x2="11.118cm" svg:y2="9.042cm"><text:p/></draw:line><draw:line text:anchor-type="paragraph" draw:z-index="33" draw:name="Line 25" draw:style-name="gr3" draw:text-style-name="P2" svg:x1="11.994cm" svg:y1="10.928cm" svg:x2="12.274cm" svg:y2="9.042cm"><text:p/></draw:line><draw:line text:anchor-type="paragraph" draw:z-index="34" draw:name="Line 26" draw:style-name="gr3" draw:text-style-name="P2" svg:x1="13.284cm" svg:y1="10.694cm" svg:x2="13.614cm" svg:y2="8.992cm"><text:p/></draw:line><draw:line text:anchor-type="paragraph" draw:z-index="35" draw:name="Line 27" draw:style-name="gr3" draw:text-style-name="P2" svg:x1="14.275cm" svg:y1="10.53cm" svg:x2="14.804cm" svg:y2="9.075cm"><text:p/></draw:line><draw:frame text:anchor-type="paragraph" draw:z-index="36" draw:name="Text Frame 5" draw:style-name="gr5" draw:text-style-name="P1" svg:width="9.147cm" svg:height="0.828cm" svg:x="6.685cm" svg:y="11.405cm"><draw:text-box><text:p>Camera wire (PPS and GND)</text:p></draw:text-box></draw:frame><draw:frame text:anchor-type="paragraph" draw:z-index="37" draw:name="Text Frame 6" draw:style-name="gr4" draw:text-style-name="P1" svg:width="3.622cm" svg:height="1.324cm" svg:x="3.642cm" svg:y="11.589cm"><draw:text-box><text:p>GNSS</text:p></draw:text-box></draw:frame><draw:line text:anchor-type="paragraph" draw:z-index="38" draw:name="Line 28" draw:style-name="gr3" draw:text-style-name="P2" svg:x1="3.03cm" svg:y1="11.423cm" svg:x2="3.593cm" svg:y2="9.322cm"><text:p/></draw:line><draw:line text:anchor-type="paragraph" draw:z-index="39" draw:name="Line 29" draw:style-name="gr3" draw:text-style-name="P2" svg:x1="3.427cm" svg:y1="11.423cm" svg:x2="5.644cm" svg:y2="11.389cm"><text:p/></draw:line><draw:line text:anchor-type="paragraph" draw:z-index="40" draw:name="Line 30" draw:style-name="gr3" draw:text-style-name="P2" svg:x1="5.562cm" svg:y1="11.076cm" svg:x2="5.596cm" svg:y2="9.125cm"><text:p/></draw:line><draw:line text:anchor-type="paragraph" draw:z-index="41" draw:name="Vertical line 3" draw:style-name="gr3" draw:text-style-name="P2" svg:x1="4.106cm" svg:y1="12.118cm" svg:x2="4.106cm" svg:y2="12.912cm"><text:p/></draw:line><draw:line text:anchor-type="paragraph" draw:z-index="42" draw:name="Line 31" draw:style-name="gr3" draw:text-style-name="P2" svg:x1="4.337cm" svg:y1="12.912cm" svg:x2="16.376cm" svg:y2="12.928cm"><text:p/></draw:line><draw:line text:anchor-type="paragraph" draw:z-index="43" draw:name="Line 32" draw:style-name="gr3" draw:text-style-name="P2" svg:x1="16.391cm" svg:y1="12.713cm" svg:x2="16.342cm" svg:y2="7.04cm"><text:p/></draw:line><draw:line text:anchor-type="paragraph" draw:z-index="44" draw:name="Line 33" draw:style-name="gr3" draw:text-style-name="P2" svg:x1="16.111cm" svg:y1="7.107cm" svg:x2="14.739cm" svg:y2="7.091cm"><text:p/></draw:line><draw:line text:anchor-type="paragraph" draw:z-index="45" draw:name="Line 34" draw:style-name="gr3" draw:text-style-name="P2" svg:x1="3.924cm" svg:y1="12.912cm" svg:x2="2.104cm" svg:y2="12.928cm"><text:p/></draw:line><draw:line text:anchor-type="paragraph" draw:z-index="46" draw:name="Line 35" draw:style-name="gr3" draw:text-style-name="P2" svg:x1="2.288cm" svg:y1="12.679cm" svg:x2="2.369cm" svg:y2="4.923cm"><text:p/></draw:line><draw:line text:anchor-type="paragraph" draw:z-index="47" draw:name="Line 36" draw:style-name="gr3" draw:text-style-name="P2" svg:x1="2.618cm" svg:y1="4.974cm" svg:x2="4.685cm" svg:y2="4.445cm"><text:p/></draw:line><draw:frame text:anchor-type="paragraph" draw:z-index="48" draw:name="Text Frame 7" draw:style-name="gr2" draw:text-style-name="P1" svg:width="1.389cm" svg:height="0.588cm" svg:x="2.304cm" svg:y="13.125cm"><draw:text-box><text:p>5V</text:p></draw:text-box></draw:frame><draw:frame text:anchor-type="paragraph" draw:z-index="49" draw:name="Text Frame 8" draw:style-name="gr1" draw:text-style-name="P1" svg:width="3.557cm" svg:height="0.712cm" svg:x="6.073cm" svg:y="13.159cm"><draw:text-box><text:p>3X GNDS</text:p></draw:text-box></draw:frame><draw:frame draw:style-name="fr1" draw:name="Image1" text:anchor-type="char" svg:x="0cm" svg:y="-0.198cm" svg:width="17.59cm" svg:height="12.317cm" draw:z-index="0"><draw:image xlink:href="Pictures/10000001000002DE0000020255F6D7133D70FC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15:42:53.206289696</meta:creation-date>
    <dc:date>2026-06-17T17:50:59.503303131</dc:date>
    <meta:editing-duration>PT1H37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